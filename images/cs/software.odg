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TC" svg:font-family="'Noto Sans TC'" style:font-family-generic="swiss" style:font-pitch="variable"/>
    <style:font-face style:name="Noto Sans TC1" svg:font-family="'Noto Sans TC'" style:font-family-generic="system" style:font-pitch="variable"/>
    <style:font-face style:name="Noto Serif TC" svg:font-family="'Noto Serif T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opacity="100%" draw:textarea-horizontal-align="justify" draw:textarea-vertical-align="middle" draw:auto-grow-height="false" fo:min-height="8cm" fo:min-width="26.25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fill="solid" draw:fill-color="#666666" draw:textarea-horizontal-align="justify" draw:textarea-vertical-align="middle" draw:auto-grow-height="false" fo:min-height="0.674cm" fo:min-width="2.617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04cm" fo:min-width="1.0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.23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6cm" fo:min-width="0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63cm" fo:min-width="0cm" loext:decorative="false"/>
      <style:paragraph-properties style:writing-mode="lr-tb"/>
    </style:style>
    <style:style style:name="gr9" style:family="graphic" style:parent-style-name="standard">
      <style:graphic-properties svg:stroke-width="0cm" draw:fill="solid" draw:fill-color="#d4ea6b" draw:textarea-horizontal-align="justify" draw:textarea-vertical-align="middle" draw:auto-grow-height="false" fo:min-height="1.347cm" fo:min-width="4.244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648cm" loext:decorative="false"/>
      <style:paragraph-properties style:writing-mode="lr-tb"/>
    </style:style>
    <style:style style:name="gr11" style:family="graphic" style:parent-style-name="objectwithoutfill">
      <style:graphic-properties svg:stroke-width="0.081cm" svg:stroke-color="#333333" draw:marker-start-width="0.321cm" draw:marker-end="Arrowheads_20_8" draw:marker-end-width="0.421cm" draw:fill="none" draw:textarea-vertical-align="middle" fo:padding-top="0.165cm" fo:padding-bottom="0.165cm" fo:padding-left="0.29cm" fo:padding-right="0.29cm" loext:decorative="false"/>
    </style:style>
    <style:style style:name="gr12" style:family="graphic" style:parent-style-name="objectwithoutfill">
      <style:graphic-properties svg:stroke-width="0.081cm" svg:stroke-color="#1c1c1c" draw:marker-start-width="0.321cm" draw:marker-end="Arrowheads_20_9" draw:marker-end-width="0.421cm" draw:fill="none" draw:textarea-vertical-align="middle" fo:padding-top="0.165cm" fo:padding-bottom="0.165cm" fo:padding-left="0.29cm" fo:padding-right="0.29cm" loext:decorative="false"/>
    </style:style>
    <style:style style:name="gr13" style:family="graphic" style:parent-style-name="standard">
      <style:graphic-properties draw:fill="solid" draw:fill-color="#666666" draw:textarea-horizontal-align="justify" draw:textarea-vertical-align="middle" draw:auto-grow-height="false" fo:min-height="0.674cm" fo:min-width="3.15cm" style:writing-mode="lr-tb" loext:decorative="false"/>
      <style:paragraph-properties style:writing-mode="lr-tb"/>
    </style:style>
    <style:style style:name="P1" style:family="paragraph">
      <loext:graphic-properties draw:fill="solid" draw:fill-color="#729fcf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666666"/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center"/>
      <style:text-properties style:font-name="Times New Roman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style:font-name="Times New Roman"/>
    </style:style>
    <style:style style:name="P7" style:family="paragraph">
      <loext:graphic-properties draw:fill="none" draw:fill-color="#ffffff"/>
      <style:paragraph-properties fo:text-align="center"/>
      <style:text-properties fo:color="#bf0041" loext:opacity="100%" style:text-line-through-style="none" style:text-line-through-type="none" style:font-name="Noto Sans TC" fo:text-shadow="1pt 1pt" fo:font-weight="bold" style:font-weight-asian="bold" style:font-weight-complex="bold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solid" draw:fill-color="#d4ea6b"/>
      <style:paragraph-properties fo:text-align="center" style:writing-mode="lr-tb"/>
      <style:text-properties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fo:color="#bf0041" loext:opacity="100%" style:text-line-through-style="none" style:text-line-through-type="none" style:font-name="Noto Sans TC" fo:text-shadow="1pt 1pt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75cm" svg:height="8.25cm" svg:x="1.5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custom-shape draw:style-name="gr3" draw:text-style-name="P3" draw:layer="layout" svg:width="3.217cm" svg:height="1.024cm" svg:x="6.55cm" svg:y="3.568cm">
            <text:p text:style-name="P2">Adding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4" draw:text-style-name="P4" draw:layer="layout" svg:width="1.985cm" svg:height="0.954cm" svg:x="2.875cm" svg:y="7.215cm">
            <draw:text-box>
              <text:p text:style-name="P2"><text:span text:style-name="T1">1,3,5</text:span></text:p>
            </draw:text-box>
          </draw:frame>
          <draw:frame draw:style-name="gr5" draw:text-style-name="P5" draw:layer="layout" svg:width="2.154cm" svg:height="0.962cm" svg:x="2.876cm" svg:y="6.059cm">
            <draw:text-box>
              <text:p>Input</text:p>
            </draw:text-box>
          </draw:frame>
          <draw:frame draw:style-name="gr6" draw:text-style-name="P6" draw:layer="layout" svg:width="0.704cm" svg:height="0.954cm" svg:x="11.701cm" svg:y="7.234cm">
            <draw:text-box>
              <text:p><text:span text:style-name="T1">9</text:span></text:p>
            </draw:text-box>
          </draw:frame>
          <draw:frame draw:style-name="gr7" draw:text-style-name="P5" draw:layer="layout" svg:width="0.43cm" svg:height="1.466cm" svg:x="7.943cm" svg:y="3.157cm">
            <draw:text-box>
              <text:p/>
            </draw:text-box>
          </draw:frame>
          <draw:frame draw:style-name="gr8" draw:text-style-name="P7" draw:layer="layout" svg:width="3.217cm" svg:height="1.013cm" svg:x="6.55cm" svg:y="2.441cm">
            <draw:text-box>
              <text:p text:style-name="P2"><text:span text:style-name="T2">Program</text:span></text:p>
            </draw:text-box>
          </draw:frame>
          <draw:custom-shape draw:style-name="gr9" draw:text-style-name="P9" xml:id="id2" draw:id="id2" draw:layer="layout" svg:width="5.509cm" svg:height="2.394cm" svg:x="5.404cm" svg:y="5.874cm">
            <text:p text:style-name="P8"><text:span text:style-name="T3">Processor</text:span></text:p>
  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frame draw:style-name="gr10" draw:text-style-name="P5" draw:layer="layout" svg:width="2.514cm" svg:height="0.962cm" svg:x="11.099cm" svg:y="6.03cm">
            <draw:text-box>
              <text:p>Output</text:p>
            </draw:text-box>
          </draw:frame>
          <draw:frame draw:style-name="gr7" draw:text-style-name="P5" xml:id="id1" draw:id="id1" draw:layer="layout" svg:width="0.43cm" svg:height="1.466cm" svg:x="7.943cm" svg:y="3.157cm">
            <draw:text-box>
              <text:p/>
            </draw:text-box>
          </draw:frame>
          <draw:connector draw:style-name="gr11" draw:text-style-name="P10" draw:layer="layout" draw:type="line" svg:x1="8.158cm" svg:y1="4.623cm" svg:x2="8.159cm" svg:y2="5.874cm" draw:start-shape="id1" draw:start-glue-point="2" draw:end-shape="id2" draw:end-glue-point="4" svg:d="M8158 4623l1 1251" svg:viewBox="0 0 2 1252">
            <text:p/>
          </draw:connector>
          <draw:connector draw:style-name="gr12" draw:text-style-name="P10" draw:layer="layout" draw:type="line" svg:x1="2.344cm" svg:y1="7.065cm" svg:x2="5.404cm" svg:y2="7.071cm" draw:end-shape="id2" draw:end-glue-point="5" svg:d="M2344 7065l3060 6" svg:viewBox="0 0 3061 7">
            <text:p/>
          </draw:connector>
          <draw:connector draw:style-name="gr12" draw:text-style-name="P10" draw:layer="layout" draw:type="line" svg:x1="10.892cm" svg:y1="7.012cm" svg:x2="13.952cm" svg:y2="7.018cm" svg:d="M10892 7012l3060 6" svg:viewBox="0 0 3061 7">
            <text:p/>
          </draw:connector>
        </draw:g>
        <draw:custom-shape draw:style-name="gr13" draw:text-style-name="P3" draw:layer="layout" svg:width="3.75cm" svg:height="1.024cm" svg:x="19.25cm" svg:y="3.568cm">
          <text:p text:style-name="P2">subtrac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" draw:text-style-name="P4" draw:layer="layout" svg:width="1.985cm" svg:height="0.954cm" svg:x="16.14cm" svg:y="7.242cm">
          <draw:text-box>
            <text:p text:style-name="P2"><text:span text:style-name="T1">5,3</text:span></text:p>
          </draw:text-box>
        </draw:frame>
        <draw:frame draw:style-name="gr5" draw:text-style-name="P5" draw:layer="layout" svg:width="2.154cm" svg:height="0.962cm" svg:x="15.876cm" svg:y="6.059cm">
          <draw:text-box>
            <text:p>Input</text:p>
          </draw:text-box>
        </draw:frame>
        <draw:frame draw:style-name="gr6" draw:text-style-name="P6" draw:layer="layout" svg:width="0.704cm" svg:height="0.954cm" svg:x="24.86cm" svg:y="7.234cm">
          <draw:text-box>
            <text:p><text:span text:style-name="T1">2</text:span></text:p>
          </draw:text-box>
        </draw:frame>
        <draw:frame draw:style-name="gr7" draw:text-style-name="P5" draw:layer="layout" svg:width="0.43cm" svg:height="1.466cm" svg:x="20.943cm" svg:y="3.157cm">
          <draw:text-box>
            <text:p/>
          </draw:text-box>
        </draw:frame>
        <draw:frame draw:style-name="gr8" draw:text-style-name="P7" draw:layer="layout" svg:width="3.217cm" svg:height="1.013cm" svg:x="19.55cm" svg:y="2.441cm">
          <draw:text-box>
            <text:p text:style-name="P2"><text:span text:style-name="T2">Program</text:span></text:p>
          </draw:text-box>
        </draw:frame>
        <draw:custom-shape draw:style-name="gr9" draw:text-style-name="P9" xml:id="id4" draw:id="id4" draw:layer="layout" svg:width="5.509cm" svg:height="2.394cm" svg:x="18.404cm" svg:y="5.874cm">
          <text:p text:style-name="P8"><text:span text:style-name="T3">Processor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0" draw:text-style-name="P5" draw:layer="layout" svg:width="2.514cm" svg:height="0.962cm" svg:x="24.099cm" svg:y="6.03cm">
          <draw:text-box>
            <text:p>Output</text:p>
          </draw:text-box>
        </draw:frame>
        <draw:frame draw:style-name="gr7" draw:text-style-name="P5" xml:id="id3" draw:id="id3" draw:layer="layout" svg:width="0.43cm" svg:height="1.466cm" svg:x="20.943cm" svg:y="3.157cm">
          <draw:text-box>
            <text:p/>
          </draw:text-box>
        </draw:frame>
        <draw:connector draw:style-name="gr11" draw:text-style-name="P10" draw:layer="layout" draw:type="line" svg:x1="21.158cm" svg:y1="4.623cm" svg:x2="21.159cm" svg:y2="5.874cm" draw:start-shape="id3" draw:start-glue-point="2" draw:end-shape="id4" draw:end-glue-point="4" svg:d="M21158 4623l1 1251" svg:viewBox="0 0 2 1252">
          <text:p/>
        </draw:connector>
        <draw:connector draw:style-name="gr12" draw:text-style-name="P10" draw:layer="layout" draw:type="line" svg:x1="15.344cm" svg:y1="7.065cm" svg:x2="18.404cm" svg:y2="7.071cm" draw:end-shape="id4" draw:end-glue-point="5" svg:d="M15344 7065l3060 6" svg:viewBox="0 0 3061 7">
          <text:p/>
        </draw:connector>
        <draw:connector draw:style-name="gr12" draw:text-style-name="P10" draw:layer="layout" draw:type="line" svg:x1="23.892cm" svg:y1="7.012cm" svg:x2="26.952cm" svg:y2="7.018cm" svg:d="M23892 7012l3060 6" svg:viewBox="0 0 3061 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TC" svg:font-family="'Noto Sans TC'" style:font-family-generic="swiss" style:font-pitch="variable"/>
    <style:font-face style:name="Noto Sans TC1" svg:font-family="'Noto Sans TC'" style:font-family-generic="system" style:font-pitch="variable"/>
    <style:font-face style:name="Noto Serif TC" svg:font-family="'Noto Serif T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1" draw:display-name="Transparency 1" draw:style="ellipsoid" draw:cx="50%" draw:cy="50%" draw:start="100%" draw:end="0%" draw:angle="0deg" draw:border="0%">
      <loext:opacity-stop svg:offset="0" svg:stop-opacity="1"/>
      <loext:opacity-stop svg:offset="1" svg:stop-opacity="0"/>
    </draw:opacity>
    <draw:marker draw:name="Arrow" svg:viewBox="0 0 20 30" svg:d="M10 0l-10 30h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TC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TC1" style:font-family-asian="'Noto Sans TC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11.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07T06:21:49.303985400</meta:creation-date>
    <dc:date>2026-06-07T07:36:42.210135700</dc:date>
    <meta:editing-duration>PT21M41S</meta:editing-duration>
    <meta:editing-cycles>7</meta:editing-cycles>
    <meta:generator>LibreOffice/26.2.3.1$Windows_X86_64 LibreOffice_project/d444ea7836163cb762d1627df3bc33e112fa142a</meta:generator>
    <meta:document-statistic meta:object-count="26"/>
  </office:meta>
</office:document-meta>
</file>